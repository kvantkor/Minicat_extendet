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000000265AA65975D.png" manifest:media-type="image/png"/>
  <manifest:file-entry manifest:full-path="Pictures/1000B19E00006D5900005210C7B17D62.svg" manifest:media-type="image/svg+xml"/>
  <manifest:file-entry manifest:full-path="Pictures/10000001000003AF00000212505B3518.png" manifest:media-type="image/png"/>
  <manifest:file-entry manifest:full-path="Pictures/1000000100000330000002656BECB886.png" manifest:media-type="image/png"/>
  <manifest:file-entry manifest:full-path="Pictures/1000C4040000844200004A6AC41BFA7B.svg" manifest:media-type="image/svg+xml"/>
  <manifest:file-entry manifest:full-path="Pictures/10000001000003AF00000212C528B43D.png" manifest:media-type="image/png"/>
  <manifest:file-entry manifest:full-path="Pictures/100140FD00006D5900005210432E18AA.svg" manifest:media-type="image/svg+xml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left" loext:decorative="false"/>
      <style:paragraph-properties style:writing-mode="lr-tb"/>
    </style:style>
    <style:style style:name="pr1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style:font-name="Bitstream Vera Sans Mono"/>
    </style:style>
    <style:style style:name="P2" style:family="paragraph">
      <loext:graphic-properties draw:fill="none" draw:fill-color="#ffffff"/>
      <style:text-properties style:font-name="Bitstream Vera Sans Mono" fo:font-size="40pt" style:font-size-asian="40pt" style:font-size-complex="40pt"/>
    </style:style>
    <style:style style:name="P3" style:family="paragraph">
      <loext:graphic-properties draw:fill="none" draw:fill-color="#ffffff"/>
      <style:text-properties style:font-name="Bitstream Vera Sans Mono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color="#000000" loext:opacity="100%"/>
    </style:style>
    <style:style style:name="P9" style:family="paragraph">
      <style:paragraph-properties fo:text-align="start"/>
      <style:text-properties fo:color="#000000" loext:opacity="100%"/>
    </style:style>
    <style:style style:name="P10" style:family="paragraph">
      <loext:graphic-properties draw:fill="none"/>
      <style:paragraph-properties fo:text-align="start"/>
      <style:text-properties fo:color="#000000" loext:opacity="100%"/>
    </style:style>
    <style:style style:name="T1" style:family="text">
      <style:text-properties style:font-name="Bitstream Vera Sans Mono" fo:font-size="40pt" style:font-size-asian="40pt" style:font-size-complex="40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Bitstream Vera Sans Mono" fo:font-size="40pt" fo:font-style="normal" fo:text-shadow="none" style:text-underline-style="none" fo:font-weight="normal" style:letter-kerning="true" style:font-size-asian="40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2" draw:layer="layout" svg:width="6.443cm" svg:height="1.894cm" svg:x="10.884cm" svg:y="0.473cm">
          <draw:text-box>
            <text:p text:style-name="P1"><text:span text:style-name="T1">Minicat</text:span></text:p>
          </draw:text-box>
        </draw:frame>
        <draw:frame draw:style-name="gr1" draw:text-style-name="P3" draw:layer="layout" svg:width="19.981cm" svg:height="1.894cm" svg:x="4.371cm" svg:y="7.522cm">
          <draw:text-box>
            <text:p text:style-name="P1"><text:span text:style-name="T2">ОС <text:s/>написанная но</text:span><text:span text:style-name="T1">вичком</text:span></text:p>
          </draw:text-box>
        </draw:frame>
        <draw:frame draw:style-name="gr1" draw:text-style-name="P4" draw:layer="layout" svg:width="13.67cm" svg:height="1.216cm" svg:x="2.706cm" svg:y="10.763cm">
          <draw:text-box>
            <text:p><text:span text:style-name="T3">Создана 1человеком и справочником</text:span></text:p>
          </draw:text-box>
        </draw:frame>
        <draw:frame draw:style-name="gr1" draw:text-style-name="P5" draw:layer="layout" svg:width="7.678cm" svg:height="1.115cm" svg:x="3.788cm" svg:y="13.89cm">
          <draw:text-box>
            <text:p>Автор: Шаповалов К. Р.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8" draw:layer="layout" svg:width="26.513cm" svg:height="4.571cm" svg:x="0.963cm" svg:y="1.166cm">
          <draw:text-box>
            <text:p><text:span text:style-name="T4">ОС <text:s/>была написана для более глубоково изучения архитектуры операционных</text:span></text:p>
            <text:p text:style-name="P7"><text:span text:style-name="T4">систем. <text:s/>Основной задачей проекта создание операционной системы что </text:span></text:p>
            <text:p text:style-name="P7"><text:span text:style-name="T4"><text:s/>Будет приближена к операционным системам <text:s/>мира <text:s/>таким как Windows и </text:span></text:p>
            <text:p text:style-name="P7"><text:span text:style-name="T4">дистрибутивы Linux, но главное более детальный разбор архитектуры операцион-</text:span></text:p>
            <text:p text:style-name="P7"><text:span text:style-name="T4">ных систем.</text:span></text:p>
          </draw:text-box>
        </draw:frame>
        <draw:frame draw:style-name="gr1" draw:text-style-name="P5" draw:layer="layout" svg:width="25.872cm" svg:height="1.979cm" svg:x="0.975cm" svg:y="6.171cm">
          <draw:text-box>
            <text:p><text:span text:style-name="T4">В проекте используется C без классов, nasm, qemu, makefile, AT%T (в качестве ас-</text:span></text:p>
            <text:p text:style-name="P7"><text:span text:style-name="T4">семблерных вставок)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10" draw:layer="layout" svg:width="28cm" svg:height="15.75cm" svg:x="0cm" svg:y="0cm">
          <draw:text-box>
            <text:p text:style-name="P9"><text:span text:style-name="T4">Архитектура и последовательность загрузки (Boot Sequence)</text:span></text:p>
            <text:p text:style-name="P9"><text:span text:style-name="T4">Multiboot Header: Точка входа для загрузчика (GRUB/QEMU). Передает ядру информацию о памяти и загруженных модулях.</text:span></text:p>
            <text:p text:style-name="P9"><text:span text:style-name="T4">GDT (Global Descriptor Table): Настройка плоской модели памяти (0–4 ГБ) и переход в защищённый режим.</text:span></text:p>
            <text:p text:style-name="P9"><text:span text:style-name="T4">PIC Remap: Перепрограммирование контроллеров прерываний 8259 для смещения аппаратных IRQ выше программных исключений.</text:span></text:p>
            <text:p text:style-name="P9"><text:span text:style-name="T4">IDT (Interrupt Descriptor Table): Инициализация таблицы векторов прерываний и регистрация обработчиков.</text:span></text:p>
            <text:p text:style-name="P9"><text:span text:style-name="T4">PIT (Programmable Interval Timer): Настройка системного таймера на частоту 100 Гц для работы планировщика задач.</text:span></text:p>
            <text:p text:style-name="P9"><text:span text:style-name="T4">Interrupt Stub: Универсальный обработчик, сохраняющий состояние CPU и передающий управление в C-код.</text:span></text:p>
            <text:p text:style-name="P9"><text:span text:style-name="T4">Основные модули и функции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C528B43D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номер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номер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505B3518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номер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номер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номер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номер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номер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9:35:16.242866168</meta:creation-date>
    <meta:generator>LibreOffice/25.2.3.2$Linux_X86_64 LibreOffice_project/52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21M26S</meta:editing-duration>
    <meta:editing-cycles>5</meta:editing-cycles>
    <dc:date>2026-04-27T20:07:59.697901165</dc:date>
    <meta:document-statistic meta:object-count="71"/>
  </office:meta>
</office:document-meta>
</file>